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5209in"/>
    </style:style>
    <style:style style:name="co2" style:family="table-column">
      <style:table-column-properties fo:break-before="auto" style:column-width="1.7835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3465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4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Eurostat Data for Calc — De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ve data pulled by the EUROSTATDATA() add-in function. Edit the formulas below and recalculate (F9) to try your own dataset codes / filters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GDP per capita (PPS), Germany 2023 — tec00114</text:p>
          </table:table-cell>
          <table:table-cell table:number-columns-repeated="6"/>
        </table:table-row>
        <table:table-row table:style-name="ro1">
          <table:table-cell table:number-matrix-columns-spanned="6" table:number-matrix-rows-spanned="2" table:formula="of:=ORG.LIBREOFFICE.EUROSTAT.ADDIN.EUROSTATADDIN.GETEUROSTATDATA(&quot;tec00114&quot;;&quot;geo=DE;time=2023&quot;)" office:value-type="string" office:string-value="freq" calcext:value-type="string">
            <text:p>freq</text:p>
          </table:table-cell>
          <table:table-cell office:value-type="string" office:string-value="indic_ppp" calcext:value-type="string">
            <text:p>indic_ppp</text:p>
          </table:table-cell>
          <table:table-cell office:value-type="string" office:string-value="ppp_cat18" calcext:value-type="string">
            <text:p>ppp_cat18</text:p>
          </table:table-cell>
          <table:table-cell office:value-type="string" office:string-value="geo" calcext:value-type="string">
            <text:p>geo</text:p>
          </table:table-cell>
          <table:table-cell office:value-type="string" office:string-value="time" calcext:value-type="string">
            <text:p>time</text:p>
          </table:table-cell>
          <table:table-cell office:value-type="string" office:string-value="value" calcext:value-type="string">
            <text:p>value</text:p>
          </table:table-cell>
          <table:table-cell/>
        </table:table-row>
        <table:table-row table:style-name="ro1">
          <table:table-cell office:value-type="string" office:string-value="A" calcext:value-type="string">
            <text:p>A</text:p>
          </table:table-cell>
          <table:table-cell office:value-type="string" office:string-value="VI_PPS_EU27_2020_HAB" calcext:value-type="string">
            <text:p>VI_PPS_EU27_2020_HAB</text:p>
          </table:table-cell>
          <table:table-cell office:value-type="string" office:string-value="GDP" calcext:value-type="string">
            <text:p>GDP</text:p>
          </table:table-cell>
          <table:table-cell office:value-type="string" office:string-value="DE" calcext:value-type="string">
            <text:p>DE</text:p>
          </table:table-cell>
          <table:table-cell office:value-type="string" office:string-value="2023" calcext:value-type="string">
            <text:p>2023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Unemployment rate by sex, France 2023 — une_rt_a</text:p>
          </table:table-cell>
          <table:table-cell table:number-columns-repeated="6"/>
        </table:table-row>
        <table:table-row table:style-name="ro1">
          <table:table-cell table:number-matrix-columns-spanned="7" table:number-matrix-rows-spanned="4" table:formula="of:=ORG.LIBREOFFICE.EUROSTAT.ADDIN.EUROSTATADDIN.GETEUROSTATDATA(&quot;une_rt_a&quot;;&quot;geo=FR;time=2023;unit=PC_ACT;age=Y15-74&quot;)" office:value-type="string" office:string-value="freq" calcext:value-type="string">
            <text:p>freq</text:p>
          </table:table-cell>
          <table:table-cell office:value-type="string" office:string-value="age" calcext:value-type="string">
            <text:p>age</text:p>
          </table:table-cell>
          <table:table-cell office:value-type="string" office:string-value="unit" calcext:value-type="string">
            <text:p>unit</text:p>
          </table:table-cell>
          <table:table-cell office:value-type="string" office:string-value="sex" calcext:value-type="string">
            <text:p>sex</text:p>
          </table:table-cell>
          <table:table-cell office:value-type="string" office:string-value="geo" calcext:value-type="string">
            <text:p>geo</text:p>
          </table:table-cell>
          <table:table-cell office:value-type="string" office:string-value="time" calcext:value-type="string">
            <text:p>time</text:p>
          </table:table-cell>
          <table:table-cell office:value-type="string" office:string-value="value" calcext:value-type="string">
            <text:p>value</text:p>
          </table:table-cell>
        </table:table-row>
        <table:table-row table:style-name="ro1">
          <table:table-cell office:value-type="string" office:string-value="A" calcext:value-type="string">
            <text:p>A</text:p>
          </table:table-cell>
          <table:table-cell office:value-type="string" office:string-value="Y15-74" calcext:value-type="string">
            <text:p>Y15-74</text:p>
          </table:table-cell>
          <table:table-cell office:value-type="string" office:string-value="PC_ACT" calcext:value-type="string">
            <text:p>PC_ACT</text:p>
          </table:table-cell>
          <table:table-cell office:value-type="string" office:string-value="F" calcext:value-type="string">
            <text:p>F</text:p>
          </table:table-cell>
          <table:table-cell office:value-type="string" office:string-value="FR" calcext:value-type="string">
            <text:p>FR</text:p>
          </table:table-cell>
          <table:table-cell office:value-type="string" office:string-value="2023" calcext:value-type="string">
            <text:p>2023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office:string-value="A" calcext:value-type="string">
            <text:p>A</text:p>
          </table:table-cell>
          <table:table-cell office:value-type="string" office:string-value="Y15-74" calcext:value-type="string">
            <text:p>Y15-74</text:p>
          </table:table-cell>
          <table:table-cell office:value-type="string" office:string-value="PC_ACT" calcext:value-type="string">
            <text:p>PC_ACT</text:p>
          </table:table-cell>
          <table:table-cell office:value-type="string" office:string-value="M" calcext:value-type="string">
            <text:p>M</text:p>
          </table:table-cell>
          <table:table-cell office:value-type="string" office:string-value="FR" calcext:value-type="string">
            <text:p>FR</text:p>
          </table:table-cell>
          <table:table-cell office:value-type="string" office:string-value="2023" calcext:value-type="string">
            <text:p>2023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office:string-value="A" calcext:value-type="string">
            <text:p>A</text:p>
          </table:table-cell>
          <table:table-cell office:value-type="string" office:string-value="Y15-74" calcext:value-type="string">
            <text:p>Y15-74</text:p>
          </table:table-cell>
          <table:table-cell office:value-type="string" office:string-value="PC_ACT" calcext:value-type="string">
            <text:p>PC_ACT</text:p>
          </table:table-cell>
          <table:table-cell office:value-type="string" office:string-value="T" calcext:value-type="string">
            <text:p>T</text:p>
          </table:table-cell>
          <table:table-cell office:value-type="string" office:string-value="FR" calcext:value-type="string">
            <text:p>FR</text:p>
          </table:table-cell>
          <table:table-cell office:value-type="string" office:string-value="2023" calcext:value-type="string">
            <text:p>2023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Try it yourself — same dataset, Germany:</text:p>
          </table:table-cell>
          <table:table-cell table:number-columns-repeated="6"/>
        </table:table-row>
        <table:table-row table:style-name="ro1">
          <table:table-cell table:number-matrix-columns-spanned="7" table:number-matrix-rows-spanned="4" table:formula="of:=ORG.LIBREOFFICE.EUROSTAT.ADDIN.EUROSTATADDIN.GETEUROSTATDATA(&quot;une_rt_a&quot;;&quot;geo=DE;time=2023;unit=PC_ACT;age=Y15-74&quot;)" office:value-type="string" office:string-value="freq" calcext:value-type="string">
            <text:p>freq</text:p>
          </table:table-cell>
          <table:table-cell office:value-type="string" office:string-value="age" calcext:value-type="string">
            <text:p>age</text:p>
          </table:table-cell>
          <table:table-cell office:value-type="string" office:string-value="unit" calcext:value-type="string">
            <text:p>unit</text:p>
          </table:table-cell>
          <table:table-cell office:value-type="string" office:string-value="sex" calcext:value-type="string">
            <text:p>sex</text:p>
          </table:table-cell>
          <table:table-cell office:value-type="string" office:string-value="geo" calcext:value-type="string">
            <text:p>geo</text:p>
          </table:table-cell>
          <table:table-cell office:value-type="string" office:string-value="time" calcext:value-type="string">
            <text:p>time</text:p>
          </table:table-cell>
          <table:table-cell office:value-type="string" office:string-value="value" calcext:value-type="string">
            <text:p>value</text:p>
          </table:table-cell>
        </table:table-row>
        <table:table-row table:style-name="ro1">
          <table:table-cell office:value-type="string" office:string-value="A" calcext:value-type="string">
            <text:p>A</text:p>
          </table:table-cell>
          <table:table-cell office:value-type="string" office:string-value="Y15-74" calcext:value-type="string">
            <text:p>Y15-74</text:p>
          </table:table-cell>
          <table:table-cell office:value-type="string" office:string-value="PC_ACT" calcext:value-type="string">
            <text:p>PC_ACT</text:p>
          </table:table-cell>
          <table:table-cell office:value-type="string" office:string-value="F" calcext:value-type="string">
            <text:p>F</text:p>
          </table:table-cell>
          <table:table-cell office:value-type="string" office:string-value="DE" calcext:value-type="string">
            <text:p>DE</text:p>
          </table:table-cell>
          <table:table-cell office:value-type="string" office:string-value="2023" calcext:value-type="string">
            <text:p>2023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office:string-value="A" calcext:value-type="string">
            <text:p>A</text:p>
          </table:table-cell>
          <table:table-cell office:value-type="string" office:string-value="Y15-74" calcext:value-type="string">
            <text:p>Y15-74</text:p>
          </table:table-cell>
          <table:table-cell office:value-type="string" office:string-value="PC_ACT" calcext:value-type="string">
            <text:p>PC_ACT</text:p>
          </table:table-cell>
          <table:table-cell office:value-type="string" office:string-value="M" calcext:value-type="string">
            <text:p>M</text:p>
          </table:table-cell>
          <table:table-cell office:value-type="string" office:string-value="DE" calcext:value-type="string">
            <text:p>DE</text:p>
          </table:table-cell>
          <table:table-cell office:value-type="string" office:string-value="2023" calcext:value-type="string">
            <text:p>202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office:string-value="A" calcext:value-type="string">
            <text:p>A</text:p>
          </table:table-cell>
          <table:table-cell office:value-type="string" office:string-value="Y15-74" calcext:value-type="string">
            <text:p>Y15-74</text:p>
          </table:table-cell>
          <table:table-cell office:value-type="string" office:string-value="PC_ACT" calcext:value-type="string">
            <text:p>PC_ACT</text:p>
          </table:table-cell>
          <table:table-cell office:value-type="string" office:string-value="T" calcext:value-type="string">
            <text:p>T</text:p>
          </table:table-cell>
          <table:table-cell office:value-type="string" office:string-value="DE" calcext:value-type="string">
            <text:p>DE</text:p>
          </table:table-cell>
          <table:table-cell office:value-type="string" office:string-value="2023" calcext:value-type="string">
            <text:p>2023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Inflation rate (HICP) by year, Germany, 2015– — tec001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sinceTimePeriod" isn't a dimension — it's one of Eurostat's own reserved query parameters (also: lastTimePeriod) — and works here too, since filters pass straight through to the API.</text:p>
          </table:table-cell>
          <table:table-cell table:number-columns-repeated="6"/>
        </table:table-row>
        <table:table-row table:style-name="ro1">
          <table:table-cell table:number-matrix-columns-spanned="6" table:number-matrix-rows-spanned="12" table:formula="of:=ORG.LIBREOFFICE.EUROSTAT.ADDIN.EUROSTATADDIN.GETEUROSTATDATA(&quot;tec00118&quot;;&quot;geo=DE;sinceTimePeriod=2015&quot;)" office:value-type="string" office:string-value="freq" calcext:value-type="string">
            <text:p>freq</text:p>
          </table:table-cell>
          <table:table-cell office:value-type="string" office:string-value="unit" calcext:value-type="string">
            <text:p>unit</text:p>
          </table:table-cell>
          <table:table-cell office:value-type="string" office:string-value="coicop18" calcext:value-type="string">
            <text:p>coicop18</text:p>
          </table:table-cell>
          <table:table-cell office:value-type="string" office:string-value="geo" calcext:value-type="string">
            <text:p>geo</text:p>
          </table:table-cell>
          <table:table-cell office:value-type="string" office:string-value="time" calcext:value-type="string">
            <text:p>time</text:p>
          </table:table-cell>
          <table:table-cell office:value-type="string" office:string-value="value" calcext:value-type="string">
            <text:p>value</text:p>
          </table:table-cell>
          <table:table-cell/>
        </table:table-row>
        <table:table-row table:style-name="ro1">
          <table:table-cell office:value-type="string" office:string-value="A" calcext:value-type="string">
            <text:p>A</text:p>
          </table:table-cell>
          <table:table-cell office:value-type="string" office:string-value="RCH_A_AVG" calcext:value-type="string">
            <text:p>RCH_A_AVG</text:p>
          </table:table-cell>
          <table:table-cell office:value-type="string" office:string-value="TOTAL" calcext:value-type="string">
            <text:p>TOTAL</text:p>
          </table:table-cell>
          <table:table-cell office:value-type="string" office:string-value="DE" calcext:value-type="string">
            <text:p>DE</text:p>
          </table:table-cell>
          <table:table-cell office:value-type="string" office:string-value="2015" calcext:value-type="string">
            <text:p>2015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office:string-value="A" calcext:value-type="string">
            <text:p>A</text:p>
          </table:table-cell>
          <table:table-cell office:value-type="string" office:string-value="RCH_A_AVG" calcext:value-type="string">
            <text:p>RCH_A_AVG</text:p>
          </table:table-cell>
          <table:table-cell office:value-type="string" office:string-value="TOTAL" calcext:value-type="string">
            <text:p>TOTAL</text:p>
          </table:table-cell>
          <table:table-cell office:value-type="string" office:string-value="DE" calcext:value-type="string">
            <text:p>DE</text:p>
          </table:table-cell>
          <table:table-cell office:value-type="string" office:string-value="2016" calcext:value-type="string">
            <text:p>2016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office:string-value="A" calcext:value-type="string">
            <text:p>A</text:p>
          </table:table-cell>
          <table:table-cell office:value-type="string" office:string-value="RCH_A_AVG" calcext:value-type="string">
            <text:p>RCH_A_AVG</text:p>
          </table:table-cell>
          <table:table-cell office:value-type="string" office:string-value="TOTAL" calcext:value-type="string">
            <text:p>TOTAL</text:p>
          </table:table-cell>
          <table:table-cell office:value-type="string" office:string-value="DE" calcext:value-type="string">
            <text:p>DE</text:p>
          </table:table-cell>
          <table:table-cell office:value-type="string" office:string-value="2017" calcext:value-type="string">
            <text:p>2017</text:p>
          </table:table-cell>
          <table:table-cell office:value-type="float" office:value="1.7" calcext:value-type="float">
            <text:p>1.7</text:p>
          </table:table-cell>
          <table:table-cell/>
        </table:table-row>
        <table:table-row table:style-name="ro1">
          <table:table-cell office:value-type="string" office:string-value="A" calcext:value-type="string">
            <text:p>A</text:p>
          </table:table-cell>
          <table:table-cell office:value-type="string" office:string-value="RCH_A_AVG" calcext:value-type="string">
            <text:p>RCH_A_AVG</text:p>
          </table:table-cell>
          <table:table-cell office:value-type="string" office:string-value="TOTAL" calcext:value-type="string">
            <text:p>TOTAL</text:p>
          </table:table-cell>
          <table:table-cell office:value-type="string" office:string-value="DE" calcext:value-type="string">
            <text:p>DE</text:p>
          </table:table-cell>
          <table:table-cell office:value-type="string" office:string-value="2018" calcext:value-type="string">
            <text:p>2018</text:p>
          </table:table-cell>
          <table:table-cell office:value-type="float" office:value="1.9" calcext:value-type="float">
            <text:p>1.9</text:p>
          </table:table-cell>
          <table:table-cell/>
        </table:table-row>
        <table:table-row table:style-name="ro1">
          <table:table-cell office:value-type="string" office:string-value="A" calcext:value-type="string">
            <text:p>A</text:p>
          </table:table-cell>
          <table:table-cell office:value-type="string" office:string-value="RCH_A_AVG" calcext:value-type="string">
            <text:p>RCH_A_AVG</text:p>
          </table:table-cell>
          <table:table-cell office:value-type="string" office:string-value="TOTAL" calcext:value-type="string">
            <text:p>TOTAL</text:p>
          </table:table-cell>
          <table:table-cell office:value-type="string" office:string-value="DE" calcext:value-type="string">
            <text:p>DE</text:p>
          </table:table-cell>
          <table:table-cell office:value-type="string" office:string-value="2019" calcext:value-type="string">
            <text:p>2019</text:p>
          </table:table-cell>
          <table:table-cell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string" office:string-value="A" calcext:value-type="string">
            <text:p>A</text:p>
          </table:table-cell>
          <table:table-cell office:value-type="string" office:string-value="RCH_A_AVG" calcext:value-type="string">
            <text:p>RCH_A_AVG</text:p>
          </table:table-cell>
          <table:table-cell office:value-type="string" office:string-value="TOTAL" calcext:value-type="string">
            <text:p>TOTAL</text:p>
          </table:table-cell>
          <table:table-cell office:value-type="string" office:string-value="DE" calcext:value-type="string">
            <text:p>DE</text:p>
          </table:table-cell>
          <table:table-cell office:value-type="string" office:string-value="2020" calcext:value-type="string">
            <text:p>202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office:string-value="A" calcext:value-type="string">
            <text:p>A</text:p>
          </table:table-cell>
          <table:table-cell office:value-type="string" office:string-value="RCH_A_AVG" calcext:value-type="string">
            <text:p>RCH_A_AVG</text:p>
          </table:table-cell>
          <table:table-cell office:value-type="string" office:string-value="TOTAL" calcext:value-type="string">
            <text:p>TOTAL</text:p>
          </table:table-cell>
          <table:table-cell office:value-type="string" office:string-value="DE" calcext:value-type="string">
            <text:p>DE</text:p>
          </table:table-cell>
          <table:table-cell office:value-type="string" office:string-value="2021" calcext:value-type="string">
            <text:p>2021</text:p>
          </table:table-cell>
          <table:table-cell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string" office:string-value="A" calcext:value-type="string">
            <text:p>A</text:p>
          </table:table-cell>
          <table:table-cell office:value-type="string" office:string-value="RCH_A_AVG" calcext:value-type="string">
            <text:p>RCH_A_AVG</text:p>
          </table:table-cell>
          <table:table-cell office:value-type="string" office:string-value="TOTAL" calcext:value-type="string">
            <text:p>TOTAL</text:p>
          </table:table-cell>
          <table:table-cell office:value-type="string" office:string-value="DE" calcext:value-type="string">
            <text:p>DE</text:p>
          </table:table-cell>
          <table:table-cell office:value-type="string" office:string-value="2022" calcext:value-type="string">
            <text:p>2022</text:p>
          </table:table-cell>
          <table:table-cell office:value-type="float" office:value="8.7" calcext:value-type="float">
            <text:p>8.7</text:p>
          </table:table-cell>
          <table:table-cell/>
        </table:table-row>
        <table:table-row table:style-name="ro1">
          <table:table-cell office:value-type="string" office:string-value="A" calcext:value-type="string">
            <text:p>A</text:p>
          </table:table-cell>
          <table:table-cell office:value-type="string" office:string-value="RCH_A_AVG" calcext:value-type="string">
            <text:p>RCH_A_AVG</text:p>
          </table:table-cell>
          <table:table-cell office:value-type="string" office:string-value="TOTAL" calcext:value-type="string">
            <text:p>TOTAL</text:p>
          </table:table-cell>
          <table:table-cell office:value-type="string" office:string-value="DE" calcext:value-type="string">
            <text:p>DE</text:p>
          </table:table-cell>
          <table:table-cell office:value-type="string" office:string-value="2023" calcext:value-type="string">
            <text:p>202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office:string-value="A" calcext:value-type="string">
            <text:p>A</text:p>
          </table:table-cell>
          <table:table-cell office:value-type="string" office:string-value="RCH_A_AVG" calcext:value-type="string">
            <text:p>RCH_A_AVG</text:p>
          </table:table-cell>
          <table:table-cell office:value-type="string" office:string-value="TOTAL" calcext:value-type="string">
            <text:p>TOTAL</text:p>
          </table:table-cell>
          <table:table-cell office:value-type="string" office:string-value="DE" calcext:value-type="string">
            <text:p>DE</text:p>
          </table:table-cell>
          <table:table-cell office:value-type="string" office:string-value="2024" calcext:value-type="string">
            <text:p>2024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office:string-value="A" calcext:value-type="string">
            <text:p>A</text:p>
          </table:table-cell>
          <table:table-cell office:value-type="string" office:string-value="RCH_A_AVG" calcext:value-type="string">
            <text:p>RCH_A_AVG</text:p>
          </table:table-cell>
          <table:table-cell office:value-type="string" office:string-value="TOTAL" calcext:value-type="string">
            <text:p>TOTAL</text:p>
          </table:table-cell>
          <table:table-cell office:value-type="string" office:string-value="DE" calcext:value-type="string">
            <text:p>DE</text:p>
          </table:table-cell>
          <table:table-cell office:value-type="string" office:string-value="2025" calcext:value-type="string">
            <text:p>2025</text:p>
          </table:table-cell>
          <table:table-cell office:value-type="float" office:value="2.3" calcext:value-type="float">
            <text:p>2.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Unknown dataset code — shows a readable error instead of Err:508:</text:p>
          </table:table-cell>
          <table:table-cell table:number-columns-repeated="6"/>
        </table:table-row>
        <table:table-row table:style-name="ro1">
          <table:table-cell table:number-matrix-columns-spanned="1" table:number-matrix-rows-spanned="1" table:formula="of:=ORG.LIBREOFFICE.EUROSTAT.ADDIN.EUROSTATADDIN.GETEUROSTATDATA(&quot;not_a_real_dataset&quot;;&quot;&quot;)" office:value-type="string" office:string-value="#ERROR: Dataset not found: not_a_real_dataset" calcext:value-type="string">
            <text:p>#ERROR: Dataset not found: not_a_real_dataset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7-08T17:46:25.777372584</dc:date>
    <meta:editing-duration>PT3S</meta:editing-duration>
    <meta:editing-cycles>1</meta:editing-cycles>
    <meta:document-statistic meta:table-count="1" meta:cell-count="149" meta:object-count="0"/>
    <meta:generator>LibreOffice/26.2.4.2$Linux_X86_64 LibreOffice_project/0229ac93fcf0d7cbc6376066c6f35021cef002dc</meta:generator>
  </office:meta>
</office:document-meta>
</file>