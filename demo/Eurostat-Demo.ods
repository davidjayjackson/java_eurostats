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Eurostat Data for Calc — De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 data pulled by the EUROSTATDATA() add-in function. Edit the formulas below and recalculate (F9) to try your own dataset codes / filter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GDP per capita (PPS), Germany 2023 — tec00114</text:p>
          </table:table-cell>
          <table:table-cell table:number-columns-repeated="6"/>
        </table:table-row>
        <table:table-row table:style-name="ro1">
          <table:table-cell table:number-matrix-columns-spanned="6" table:number-matrix-rows-spanned="2" table:formula="of:=ORG.LIBREOFFICE.EUROSTAT.ADDIN.EUROSTATADDIN.GETEUROSTATDATA(&quot;tec00114&quot;;&quot;geo=DE;time=2023&quot;)" office:value-type="string" office:string-value="freq" calcext:value-type="string">
            <text:p>freq</text:p>
          </table:table-cell>
          <table:table-cell office:value-type="string" office:string-value="indic_ppp" calcext:value-type="string">
            <text:p>indic_ppp</text:p>
          </table:table-cell>
          <table:table-cell office:value-type="string" office:string-value="ppp_cat18" calcext:value-type="string">
            <text:p>ppp_cat18</text:p>
          </table:table-cell>
          <table:table-cell office:value-type="string" office:string-value="geo" calcext:value-type="string">
            <text:p>geo</text:p>
          </table:table-cell>
          <table:table-cell office:value-type="string" office:string-value="time" calcext:value-type="string">
            <text:p>time</text:p>
          </table:table-cell>
          <table:table-cell office:value-type="string" office:string-value="value" calcext:value-type="string">
            <text:p>value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VI_PPS_EU27_2020_HAB" calcext:value-type="string">
            <text:p>VI_PPS_EU27_2020_HAB</text:p>
          </table:table-cell>
          <table:table-cell office:value-type="string" office:string-value="GDP" calcext:value-type="string">
            <text:p>GDP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Unemployment rate by sex, France 2023 — une_rt_a</text:p>
          </table:table-cell>
          <table:table-cell table:number-columns-repeated="6"/>
        </table:table-row>
        <table:table-row table:style-name="ro1">
          <table:table-cell table:number-matrix-columns-spanned="7" table:number-matrix-rows-spanned="4" table:formula="of:=ORG.LIBREOFFICE.EUROSTAT.ADDIN.EUROSTATADDIN.GETEUROSTATDATA(&quot;une_rt_a&quot;;&quot;geo=FR;time=2023;unit=PC_ACT;age=Y15-74&quot;)" office:value-type="string" office:string-value="freq" calcext:value-type="string">
            <text:p>freq</text:p>
          </table:table-cell>
          <table:table-cell office:value-type="string" office:string-value="age" calcext:value-type="string">
            <text:p>age</text:p>
          </table:table-cell>
          <table:table-cell office:value-type="string" office:string-value="unit" calcext:value-type="string">
            <text:p>unit</text:p>
          </table:table-cell>
          <table:table-cell office:value-type="string" office:string-value="sex" calcext:value-type="string">
            <text:p>sex</text:p>
          </table:table-cell>
          <table:table-cell office:value-type="string" office:string-value="geo" calcext:value-type="string">
            <text:p>geo</text:p>
          </table:table-cell>
          <table:table-cell office:value-type="string" office:string-value="time" calcext:value-type="string">
            <text:p>time</text:p>
          </table:table-cell>
          <table:table-cell office:value-type="string" office:string-value="value" calcext:value-type="string">
            <text:p>value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FR" calcext:value-type="string">
            <text:p>FR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FR" calcext:value-type="string">
            <text:p>FR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T" calcext:value-type="string">
            <text:p>T</text:p>
          </table:table-cell>
          <table:table-cell office:value-type="string" office:string-value="FR" calcext:value-type="string">
            <text:p>FR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ry it yourself — same dataset, Germany:</text:p>
          </table:table-cell>
          <table:table-cell table:number-columns-repeated="6"/>
        </table:table-row>
        <table:table-row table:style-name="ro1">
          <table:table-cell table:number-matrix-columns-spanned="7" table:number-matrix-rows-spanned="4" table:formula="of:=ORG.LIBREOFFICE.EUROSTAT.ADDIN.EUROSTATADDIN.GETEUROSTATDATA(&quot;une_rt_a&quot;;&quot;geo=DE;time=2023;unit=PC_ACT;age=Y15-74&quot;)" office:value-type="string" office:string-value="freq" calcext:value-type="string">
            <text:p>freq</text:p>
          </table:table-cell>
          <table:table-cell office:value-type="string" office:string-value="age" calcext:value-type="string">
            <text:p>age</text:p>
          </table:table-cell>
          <table:table-cell office:value-type="string" office:string-value="unit" calcext:value-type="string">
            <text:p>unit</text:p>
          </table:table-cell>
          <table:table-cell office:value-type="string" office:string-value="sex" calcext:value-type="string">
            <text:p>sex</text:p>
          </table:table-cell>
          <table:table-cell office:value-type="string" office:string-value="geo" calcext:value-type="string">
            <text:p>geo</text:p>
          </table:table-cell>
          <table:table-cell office:value-type="string" office:string-value="time" calcext:value-type="string">
            <text:p>time</text:p>
          </table:table-cell>
          <table:table-cell office:value-type="string" office:string-value="value" calcext:value-type="string">
            <text:p>value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T" calcext:value-type="string">
            <text:p>T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nflation rate (HICP) by year, Germany, 2015– — tec00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inceTimePeriod" isn't a dimension — it's one of Eurostat's own reserved query parameters (also: lastTimePeriod) — and works here too, since filters pass straight through to the API.</text:p>
          </table:table-cell>
          <table:table-cell table:number-columns-repeated="6"/>
        </table:table-row>
        <table:table-row table:style-name="ro1">
          <table:table-cell table:number-matrix-columns-spanned="6" table:number-matrix-rows-spanned="12" table:formula="of:=ORG.LIBREOFFICE.EUROSTAT.ADDIN.EUROSTATADDIN.GETEUROSTATDATA(&quot;tec00118&quot;;&quot;geo=DE;sinceTimePeriod=2015&quot;)" office:value-type="string" office:string-value="freq" calcext:value-type="string">
            <text:p>freq</text:p>
          </table:table-cell>
          <table:table-cell office:value-type="string" office:string-value="unit" calcext:value-type="string">
            <text:p>unit</text:p>
          </table:table-cell>
          <table:table-cell office:value-type="string" office:string-value="coicop18" calcext:value-type="string">
            <text:p>coicop18</text:p>
          </table:table-cell>
          <table:table-cell office:value-type="string" office:string-value="geo" calcext:value-type="string">
            <text:p>geo</text:p>
          </table:table-cell>
          <table:table-cell office:value-type="string" office:string-value="time" calcext:value-type="string">
            <text:p>time</text:p>
          </table:table-cell>
          <table:table-cell office:value-type="string" office:string-value="value" calcext:value-type="string">
            <text:p>value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5" calcext:value-type="string">
            <text:p>2015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6" calcext:value-type="string">
            <text:p>201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7" calcext:value-type="string">
            <text:p>2017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8" calcext:value-type="string">
            <text:p>2018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9" calcext:value-type="string">
            <text:p>2019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0" calcext:value-type="string">
            <text:p>202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1" calcext:value-type="string">
            <text:p>2021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2" calcext:value-type="string">
            <text:p>2022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4" calcext:value-type="string">
            <text:p>2024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5" calcext:value-type="string">
            <text:p>2025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Unknown dataset code — shows a readable error instead of Err:508:</text:p>
          </table:table-cell>
          <table:table-cell table:number-columns-repeated="6"/>
        </table:table-row>
        <table:table-row table:style-name="ro1">
          <table:table-cell table:number-matrix-columns-spanned="1" table:number-matrix-rows-spanned="1" table:formula="of:=ORG.LIBREOFFICE.EUROSTAT.ADDIN.EUROSTATADDIN.GETEUROSTATDATA(&quot;not_a_real_dataset&quot;;&quot;&quot;)" office:value-type="string" office:string-value="#ERROR: Dataset not found: not_a_real_dataset" calcext:value-type="string">
            <text:p>#ERROR: Dataset not found: not_a_real_datas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8T18:20:15.424772732</dc:date>
    <meta:editing-duration>PT2S</meta:editing-duration>
    <meta:editing-cycles>1</meta:editing-cycles>
    <meta:document-statistic meta:table-count="1" meta:cell-count="149" meta:object-count="0"/>
    <meta:generator>LibreOffice/26.2.4.2$Linux_X86_64 LibreOffice_project/0229ac93fcf0d7cbc6376066c6f35021cef002dc</meta:generator>
  </office:meta>
</office:document-meta>
</file>